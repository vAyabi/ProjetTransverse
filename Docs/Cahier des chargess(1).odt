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alibri" fo:font-size="13pt" fo:font-weight="normal" officeooo:paragraph-rsid="000f99e4" style:font-size-asian="13pt" style:font-weight-asian="normal" style:font-size-complex="13pt" style:font-weight-complex="normal"/>
    </style:style>
    <style:style style:name="P2" style:family="paragraph" style:parent-style-name="Text_20_body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3" style:family="paragraph" style:parent-style-name="Heading_20_2">
      <style:text-properties style:font-name="Calibri" fo:font-weight="normal" officeooo:rsid="0013e39b" style:font-weight-asian="normal" style:font-weight-complex="normal"/>
    </style:style>
    <style:style style:name="P4" style:family="paragraph" style:parent-style-name="Text_20_body">
      <style:text-properties style:font-name="Calibri" fo:font-weight="normal" officeooo:rsid="0013e39b" officeooo:paragraph-rsid="0013e39b" style:font-weight-asian="normal" style:font-weight-complex="normal"/>
    </style:style>
    <style:style style:name="P5" style:family="paragraph" style:parent-style-name="Text_20_body">
      <style:text-properties style:font-name="Calibri" fo:font-weight="normal" style:font-weight-asian="normal" style:font-weight-complex="normal"/>
    </style:style>
    <style:style style:name="P6" style:family="paragraph" style:parent-style-name="Heading_20_2">
      <style:text-properties style:font-name="Calibri" fo:font-size="12pt" fo:font-weight="normal" officeooo:paragraph-rsid="0013e39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3e39b"/>
    </style:style>
    <style:style style:name="P9" style:family="paragraph" style:parent-style-name="Text_20_body">
      <style:text-properties officeooo:paragraph-rsid="001661ef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661ef"/>
    </style:style>
    <style:style style:name="P11" style:family="paragraph" style:parent-style-name="Heading_20_1">
      <style:text-properties style:font-name="Calibri" fo:font-size="13pt" fo:font-weight="normal" officeooo:paragraph-rsid="000f99e4" style:font-size-asian="13pt" style:font-weight-asian="normal" style:font-size-complex="13pt" style:font-weight-complex="normal"/>
    </style:style>
    <style:style style:name="P12" style:family="paragraph" style:parent-style-name="Heading_20_1">
      <style:text-properties style:font-name="Calibri" fo:font-size="13pt" fo:font-weight="normal" officeooo:rsid="001982d7" officeooo:paragraph-rsid="001982d7" style:font-size-asian="13pt" style:font-weight-asian="normal" style:font-size-complex="13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weight="normal" officeooo:paragraph-rsid="0013e39b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weight="normal" style:font-weight-asian="normal" style:font-weight-complex="normal"/>
    </style:style>
    <style:style style:name="P15" style:family="paragraph" style:parent-style-name="Text_20_body" style:list-style-name="L1">
      <style:text-properties style:font-name="Calibri" fo:font-weight="normal" style:font-weight-asian="normal" style:font-weight-complex="normal"/>
    </style:style>
    <style:style style:name="P16" style:family="paragraph" style:parent-style-name="Text_20_body">
      <style:text-properties style:font-name="Calibri" fo:font-size="13pt" fo:font-weight="normal" officeooo:rsid="001982d7" officeooo:paragraph-rsid="001982d7" style:font-size-asian="13pt" style:font-weight-asian="normal" style:font-size-complex="13pt" style:font-weight-complex="normal"/>
    </style:style>
    <style:style style:name="P17" style:family="paragraph" style:parent-style-name="Text_20_body">
      <style:text-properties officeooo:rsid="001661ef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text-properties officeooo:rsid="001982d7" officeooo:paragraph-rsid="001982d7"/>
    </style:style>
    <style:style style:name="T1" style:family="text">
      <style:text-properties style:font-name="Calibri" fo:font-weight="normal" style:font-weight-asian="normal" style:font-weight-complex="normal"/>
    </style:style>
    <style:style style:name="T2" style:family="text">
      <style:text-properties officeooo:rsid="0013e39b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officeooo:rsid="0013e39b" style:font-size-asian="16pt" style:font-size-complex="16pt"/>
    </style:style>
    <style:style style:name="T5" style:family="text">
      <style:text-properties officeooo:rsid="001661ef"/>
    </style:style>
    <style:style style:name="T6" style:family="text">
      <style:text-properties officeooo:rsid="001982d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Yanis Benamara</text:h>
      <text:p text:style-name="P16">Abishek Egilone</text:p>
      <text:p text:style-name="P16">Edouard Vaucher</text:p>
      <text:h text:style-name="P1" text:outline-level="1"/>
      <text:h text:style-name="P1" text:outline-level="1"><text:tab/><text:tab/><text:tab/><text:span text:style-name="T3"><text:tab/> <text:s text:c="7"/></text:span><text:span text:style-name="T4">Cahier des charges </text:span></text:h>
      <text:h text:style-name="P3" text:outline-level="2"/>
      <text:p text:style-name="P4">- Présentation :</text:p>
      <text:p text:style-name="P5"><text:tab/>Business Care est une entreprise fondée en 2025 à Paris qui propose des services d'amélioration de la santé et du bien-être en entreprise. Elle a plusieurs bureaux à Paris et des annexes à Troyes, Nice et Biarritz. <text:span text:style-name="T2">La tâche à effectuer est d’améliorer leur infrastructures réseaux.</text:span></text:p>
      <text:h text:style-name="P6" text:outline-level="2">-<text:span text:style-name="T2">Missions à réaliser :</text:span></text:h>
      <text:list text:style-name="L1">
        <text:list-header>
          <text:p text:style-name="P13">-<text:span text:style-name="T2">Avoir</text:span> un réseau <text:span text:style-name="T2">fonctionnel</text:span> entre tous les sites</text:p>
          <text:p text:style-name="P14">-<text:span text:style-name="T2">Sécuriser</text:span> <text:span text:style-name="T2">les</text:span> données clients et prestataires </text:p>
          <text:p text:style-name="P14">-Permettre une haute disponibilité des services </text:p>
          <text:p text:style-name="P15">-Faciliter l'accès aux applications métier pour tous les employés </text:p>
        </text:list-header>
      </text:list>
      <text:p text:style-name="P19"><text:span text:style-name="T1">Architecture logique et physique (vlans, câblage)</text:span></text:p>
      <text:p text:style-name="Text_20_body"><text:span text:style-name="T1"/></text:p>
      <text:p text:style-name="Text_20_body">Site de Paris :</text:p>
      <text:p text:style-name="P8">-Installation serveur Active Directory ‘Windows Server 2022’</text:p>
      <text:p text:style-name="P8"/>
      <text:p text:style-name="P7">-Création DMZ avec <text:span text:style-name="T5">s</text:span>erveur mail </text:p>
      <text:p text:style-name="P7">-Config de VLANs</text:p>
      <text:p text:style-name="P7">-Installation <text:span text:style-name="T5">des firewalls</text:span></text:p>
      <text:p text:style-name="Text_20_body">-Mise en place <text:span text:style-name="T5">de GLPI, Zabbix</text:span></text:p>
      <text:p text:style-name="P9"><text:s/></text:p>
      <text:p text:style-name="P9">Troyes : </text:p>
      <text:p text:style-name="P7">-<text:span text:style-name="T5">Backup</text:span> (RODC) <text:s/></text:p>
      <text:p text:style-name="P7">-<text:span text:style-name="T5">Fi</text:span>rewalls OPNSense </text:p>
      <text:p text:style-name="P7">-<text:span text:style-name="T5">VPN pour se connecter à Paris</text:span></text:p>
      <text:p text:style-name="Text_20_body">- <text:span text:style-name="T5">Reste de la configuration identique à Paris</text:span></text:p>
      <text:p text:style-name="Text_20_body">Biarritz : </text:p>
      <text:p text:style-name="P7">-<text:span text:style-name="T5">S</text:span>erveurs Linux </text:p>
      <text:p text:style-name="P7">-<text:span text:style-name="T5">F</text:span>irewalls OPNSense </text:p>
      <text:p text:style-name="Text_20_body"><text:soft-page-break/>-<text:span text:style-name="T5">Architecture de Biarritz</text:span></text:p>
      <text:p text:style-name="Text_20_body">Architecture du réseau d'entreprise (BCN) : </text:p>
      <text:p text:style-name="P7">Configuration du routage site-to-site avec RIP v2, tunnels VPN IPsec GRE,Mise en place d'ACL pour la gestion des flux, redondance des routeurs (HSRP/VRRP) </text:p>
      <text:p text:style-name="Text_20_body">-Installation de systèmes de basculement automatique .</text:p>
      <text:p text:style-name="Text_20_body"/>
      <text:p text:style-name="Text_20_body">Sécurité : </text:p>
      <text:p text:style-name="P10"><text:span text:style-name="T5">R</text:span>estrictions d'installation <text:span text:style-name="T5">pour les </text:span>logiciels , </text:p>
      <text:p text:style-name="P10"><text:span text:style-name="T5">R</text:span>estrictions de navigation <text:span text:style-name="T5">sur </text:span>internet <text:span text:style-name="T5">avec</text:span> politique <text:span text:style-name="T5">stricte à suivre. </text:span><text:span text:style-name="T6">(logs et alertes)</text:span></text:p>
      <text:p text:style-name="P10"><text:span text:style-name="T5">C</text:span>ertificats SSL/TLS </text:p>
      <text:p text:style-name="P7"><text:span text:style-name="T5">B</text:span>ackups journaliers automati<text:span text:style-name="T5">ques</text:span> <text:span text:style-name="T5">et sauvegardes de données à distance en cas de besoins.</text:span></text:p>
      <text:p text:style-name="P7">Active Directory centralisé avec des groupes par rôle.<text:line-break/></text:p>
      <text:p text:style-name="Text_20_body">Virtualisation : </text:p>
      <text:p text:style-name="P7">-Utilisation de Docker pour les applications </text:p>
      <text:p text:style-name="Text_20_body">-Création d'un plan de reprise d'activité </text:p>
      <text:p text:style-name="P19">Il y aura un déploiement automatisé et des scénarios de test afin d’assurer la stabilité du réseau.</text:p>
      <text:p text:style-name="Text_20_body"><text:tab/>Planning </text:p>
      <text:p text:style-name="P17">Phase :</text:p>
      <text:p text:style-name="P7">1 (2 semaines) : Analyse des besoins et conception </text:p>
      <text:p text:style-name="P7">2 (6 semaines) : Installation et configuration </text:p>
      <text:p text:style-name="P7">3 (2 semaines) : Tests et validation </text:p>
      <text:p text:style-name="Text_20_body">4 (2 semaines) : Documentation et mise en production </text:p>
      <text:p text:style-name="Text_20_body">Livrables : </text:p>
      <text:p text:style-name="P7">-Schémas d'architecture réseau </text:p>
      <text:p text:style-name="P7">-Documentation des configurations </text:p>
      <text:p text:style-name="P7">-Procédures d'administration </text:p>
      <text:p text:style-name="P7">-Rapport de tests de sécurité </text:p>
      <text:p text:style-name="Text_20_body">-Plan d'activité 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20:51:34.684000000</meta:creation-date>
    <dc:date>2025-05-19T23:01:01.594000000</dc:date>
    <meta:editing-duration>PT5H5M4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3" meta:word-count="321" meta:character-count="2158" meta:non-whitespace-character-count="1846"/>
  </office:meta>
</office:document-meta>
</file>